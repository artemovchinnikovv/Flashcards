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Word">
            <text:p>Word</text:p>
          </table:table-cell>
          <table:table-cell table:style-name="pd1" office:value-type="string" office:string-value="Definition">
            <text:p>Definition</text:p>
          </table:table-cell>
          <table:table-cell table:style-name="pd1" office:value-type="string" office:string-value="Frequency">
            <text:p>Frequency</text:p>
          </table:table-cell>
        </table:table-row>
        <table:table-row>
          <table:table-cell office:value-type="string" office:string-value="hone">
            <text:p>hone</text:p>
          </table:table-cell>
          <table:table-cell office:value-type="string" office:string-value="to make an object sharp">
            <text:p>to make an object sharp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avage">
            <text:p>savage</text:p>
          </table:table-cell>
          <table:table-cell office:value-type="string" office:string-value="extremely violent, wild">
            <text:p>extremely violent, wil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redeem">
            <text:p>redeem</text:p>
          </table:table-cell>
          <table:table-cell office:value-type="string" office:string-value="to get something back">
            <text:p>to get something back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urge">
            <text:p>urge</text:p>
          </table:table-cell>
          <table:table-cell office:value-type="string" office:string-value="a strong wish, especially one that is difficult or impossible to control">
            <text:p>a strong wish, especially one that is difficult or impossible to contro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howl">
            <text:p>howl</text:p>
          </table:table-cell>
          <table:table-cell office:value-type="string" office:string-value="to make a long, high, crying sound, like that of a dog">
            <text:p>to make a long, high, crying sound, like that of a do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o">
            <text:p>o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crumble">
            <text:p>crumble</text:p>
          </table:table-cell>
          <table:table-cell office:value-type="string" office:string-value="to break into small pieces">
            <text:p>to break into small piec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abruptly">
            <text:p>abruptly</text:p>
          </table:table-cell>
          <table:table-cell office:value-type="string" office:string-value="suddenly">
            <text:p>suddenly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park">
            <text:p>spark</text:p>
          </table:table-cell>
          <table:table-cell office:value-type="string" office:string-value="to cause the start of something, especially an argument or fighting">
            <text:p>to cause the start of something, especially an argument or fighti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rigid">
            <text:p>rigid</text:p>
          </table:table-cell>
          <table:table-cell office:value-type="string" office:string-value="not able to be bent">
            <text:p>not able to be bent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grub">
            <text:p>grub</text:p>
          </table:table-cell>
          <table:table-cell office:value-type="string" office:string-value="an insect in the stage when it has just come out of its egg">
            <text:p>an insect in the stage when it has just come out of its eg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vertigo">
            <text:p>vertigo</text:p>
          </table:table-cell>
          <table:table-cell office:value-type="string" office:string-value="dizziness, especially because of the height">
            <text:p>dizziness, especially because of the height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rewind">
            <text:p>rewind</text:p>
          </table:table-cell>
          <table:table-cell office:value-type="string" office:string-value="to make a recording go back towards the beginning">
            <text:p>to make a recording go back towards the beginni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play along">
            <text:p>play along</text:p>
          </table:table-cell>
          <table:table-cell office:value-type="string" office:string-value="to act as if you agree with something that is happening, especially if it is  something wrong">
            <text:p>to act as if you agree with something that is happening, especially if it is  something wro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chlong">
            <text:p>schlong</text:p>
          </table:table-cell>
          <table:table-cell office:value-type="string" office:string-value="a rude word for penis">
            <text:p>a rude word for peni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hornet">
            <text:p>hornet</text:p>
          </table:table-cell>
          <table:table-cell office:value-type="string" office:string-value="a large wasp that can give you a bad sting">
            <text:p>a large wasp that can give you a bad sti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wasp">
            <text:p>wasp</text:p>
          </table:table-cell>
          <table:table-cell office:value-type="string" office:string-value="a flying insect, often black and yellow, that can sting">
            <text:p>a flying insect, often black and yellow, that can sti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ting">
            <text:p>sting</text:p>
          </table:table-cell>
          <table:table-cell office:value-type="string" office:string-value="to produce a small but painful injury by making a very small hole in the skin, especially of insects and plants">
            <text:p>to produce a small but painful injury by making a very small hole in the skin, especially of insects and plant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double entendre">
            <text:p>double entendre</text:p>
          </table:table-cell>
          <table:table-cell office:value-type="string" office:string-value="a word or phrase that might be understood in two ways, one of which is usually sexual">
            <text:p>a word or phrase that might be understood in two ways, one of which is usually sexu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oot">
            <text:p>soot</text:p>
          </table:table-cell>
          <table:table-cell office:value-type="string" office:string-value="a black powder composed mainly of carbon, produced when coal, wood is burned">
            <text:p>a black powder composed mainly of carbon, produced when coal, wood is burne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marble">
            <text:p>marble</text:p>
          </table:table-cell>
          <table:table-cell office:value-type="string" office:string-value="a type of hard stone, often with a pattern of irregular lines going through it, that is used as a building material and in statues">
            <text:p>a type of hard stone, often with a pattern of irregular lines going through it, that is used as a building material and in statu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beyond a reasonable doubt">
            <text:p>beyond a reasonable doubt</text:p>
          </table:table-cell>
          <table:table-cell office:value-type="string" office:string-value="there is enough proof for the person accused of a crime to be judged guilty">
            <text:p>there is enough proof for the person accused of a crime to be judged guilty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roller coaster">
            <text:p>roller coaster</text:p>
          </table:table-cell>
          <table:table-cell office:value-type="string" office:string-value="a small railroad, especially in an amusement park, with open cars that travel quickly along a steep, curved track that goes up and down over and over">
            <text:p>a small railroad, especially in an amusement park, with open cars that travel quickly along a steep, curved track that goes up and down over and over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rather">
            <text:p>rather</text:p>
          </table:table-cell>
          <table:table-cell office:value-type="string" office:string-value="more exactly">
            <text:p>more exactly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ask someone out">
            <text:p>ask someone out</text:p>
          </table:table-cell>
          <table:table-cell office:value-type="string" office:string-value="to invite someone to come with you to a place such as the cinema or a restaurant, especially as a way of starting a romantic relationship">
            <text:p>to invite someone to come with you to a place such as the cinema or a restaurant, especially as a way of starting a romantic relationship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beckon">
            <text:p>beckon</text:p>
          </table:table-cell>
          <table:table-cell office:value-type="string" office:string-value="to attract people">
            <text:p>to attract peopl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eizure">
            <text:p>seizure</text:p>
          </table:table-cell>
          <table:table-cell office:value-type="string" office:string-value="a very sudden attack of an illness in which someone becomes unconscious or develops violent movements">
            <text:p>a very sudden attack of an illness in which someone becomes unconscious or develops violent movements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2</meta:generator>
  </office:meta>
</office:document-meta>
</file>