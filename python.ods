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Word">
            <text:p>Word</text:p>
          </table:table-cell>
          <table:table-cell table:style-name="pd1" office:value-type="string" office:string-value="Definition">
            <text:p>Definition</text:p>
          </table:table-cell>
          <table:table-cell table:style-name="pd1" office:value-type="string" office:string-value="Frequency">
            <text:p>Frequency</text:p>
          </table:table-cell>
        </table:table-row>
        <table:table-row>
          <table:table-cell office:value-type="string" office:string-value="if __name__ == &quot;__main__&quot;:">
            <text:p>if __name__ == "__main__":</text:p>
          </table:table-cell>
          <table:table-cell office:value-type="string" office:string-value="to check if the program is being imported or used directly (for the tests)">
            <text:p>to check if the program is being imported or used directly (for the tests)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from pathlib import Path">
            <text:p>from pathlib import Path</text:p>
          </table:table-cell>
          <table:table-cell office:value-type="string" office:string-value="to import function to read (and not only) text file">
            <text:p>to import function to read (and not only) text fil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data = Path(&quot;filename&quot;).read_text().splitlines()">
            <text:p>data = Path("filename").read_text().splitlines()</text:p>
          </table:table-cell>
          <table:table-cell office:value-type="string" office:string-value="to read filename.txt (in the same directory), and then split lines to list">
            <text:p>to read filename.txt (in the same directory), and then split lines to lis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ys.path.append(&quot;path_name&quot;)">
            <text:p>sys.path.append("path_name")</text:p>
          </table:table-cell>
          <table:table-cell office:value-type="string" office:string-value="to add path to import from">
            <text:p>to add path to import from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mport sys">
            <text:p>import sys</text:p>
          </table:table-cell>
          <table:table-cell office:value-type="string" office:string-value="to import library to change import path">
            <text:p>to import library to change import path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def __init__(self, t: float):">
            <text:p>def __init__(self, t: float):</text:p>
          </table:table-cell>
          <table:table-cell office:value-type="string" office:string-value="to initialize class with float t initialization parameter">
            <text:p>to initialize class with float t initialization parameter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def f(t: float = 10) -&gt; float:">
            <text:p>def f(t: float = 10) -&gt; float:</text:p>
          </table:table-cell>
          <table:table-cell office:value-type="string" office:string-value="to create function with name f and initialization parameter float t that equals 10 unless given, and function returns only float">
            <text:p>to create function with name f and initialization parameter float t that equals 10 unless given, and function returns only float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2</meta:generator>
  </office:meta>
</office:document-meta>
</file>