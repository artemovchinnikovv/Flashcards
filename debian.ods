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dmesg">
            <text:p>dmesg</text:p>
          </table:table-cell>
          <table:table-cell office:value-type="string" office:string-value="to display all messages from the kernel ring buffer">
            <text:p>to display all messages from the kernel ring buff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ython3 -m venv venv_name">
            <text:p>python3 -m venv venv_name</text:p>
          </table:table-cell>
          <table:table-cell office:value-type="string" office:string-value="to create a virtual environment for python">
            <text:p>to create a virtual environment for pytho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lsusb">
            <text:p>lsusb</text:p>
          </table:table-cell>
          <table:table-cell office:value-type="string" office:string-value="list USB devices">
            <text:p>list USB dev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.">
            <text:p>.</text:p>
          </table:table-cell>
          <table:table-cell office:value-type="string" office:string-value="current directory">
            <text:p>current director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..">
            <text:p>..</text:p>
          </table:table-cell>
          <table:table-cell office:value-type="string" office:string-value="parent directory">
            <text:p>parent directory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