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Word">
            <text:p>Word</text:p>
          </table:table-cell>
          <table:table-cell table:style-name="pd1" office:value-type="string" office:string-value="Definition">
            <text:p>Definition</text:p>
          </table:table-cell>
          <table:table-cell table:style-name="pd1" office:value-type="string" office:string-value="Frequency">
            <text:p>Frequency</text:p>
          </table:table-cell>
        </table:table-row>
        <table:table-row>
          <table:table-cell office:value-type="string" office:string-value="dmesg">
            <text:p>dmesg</text:p>
          </table:table-cell>
          <table:table-cell office:value-type="string" office:string-value="to display all messages from the kernel ring buffer">
            <text:p>to display all messages from the kernel ring buffe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python3 -m venv venv_name">
            <text:p>python3 -m venv venv_name</text:p>
          </table:table-cell>
          <table:table-cell office:value-type="string" office:string-value="to create a virtual environment for python">
            <text:p>to create a virtual environment for python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2</meta:generator>
  </office:meta>
</office:document-meta>
</file>