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Word">
            <text:p>Word</text:p>
          </table:table-cell>
          <table:table-cell table:style-name="pd1" office:value-type="string" office:string-value="Definition">
            <text:p>Definition</text:p>
          </table:table-cell>
          <table:table-cell table:style-name="pd1" office:value-type="string" office:string-value="Frequency">
            <text:p>Frequency</text:p>
          </table:table-cell>
        </table:table-row>
        <table:table-row>
          <table:table-cell office:value-type="string" office:string-value="hone">
            <text:p>hone</text:p>
          </table:table-cell>
          <table:table-cell office:value-type="string" office:string-value="to make an object sharp">
            <text:p>to make an object sharp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avage">
            <text:p>savage</text:p>
          </table:table-cell>
          <table:table-cell office:value-type="string" office:string-value="extremely violent, wild">
            <text:p>extremely violent, wil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deem">
            <text:p>redeem</text:p>
          </table:table-cell>
          <table:table-cell office:value-type="string" office:string-value="to get something back">
            <text:p>to get something back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urge">
            <text:p>urge</text:p>
          </table:table-cell>
          <table:table-cell office:value-type="string" office:string-value="a strong wish, especially one that is difficult or impossible to control">
            <text:p>a strong wish, especially one that is difficult or impossible to contro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owl">
            <text:p>howl</text:p>
          </table:table-cell>
          <table:table-cell office:value-type="string" office:string-value="to make a long, high, crying sound, like that of a dog">
            <text:p>to make a long, high, crying sound, like that of a do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">
            <text:p>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crumble">
            <text:p>crumble</text:p>
          </table:table-cell>
          <table:table-cell office:value-type="string" office:string-value="to break into small pieces">
            <text:p>to break into small pie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bruptly">
            <text:p>abruptly</text:p>
          </table:table-cell>
          <table:table-cell office:value-type="string" office:string-value="suddenly">
            <text:p>suddenl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park">
            <text:p>spark</text:p>
          </table:table-cell>
          <table:table-cell office:value-type="string" office:string-value="to cause the start of something, especially an argument or fighting">
            <text:p>to cause the start of something, especially an argument or fight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igid">
            <text:p>rigid</text:p>
          </table:table-cell>
          <table:table-cell office:value-type="string" office:string-value="not able to be bent">
            <text:p>not able to be ben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grub">
            <text:p>grub</text:p>
          </table:table-cell>
          <table:table-cell office:value-type="string" office:string-value="an insect in the stage when it has just come out of its egg">
            <text:p>an insect in the stage when it has just come out of its eg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vertigo">
            <text:p>vertigo</text:p>
          </table:table-cell>
          <table:table-cell office:value-type="string" office:string-value="dizziness, especially because of the height">
            <text:p>dizziness, especially because of the heigh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wind">
            <text:p>rewind</text:p>
          </table:table-cell>
          <table:table-cell office:value-type="string" office:string-value="to make a recording go back towards the beginning">
            <text:p>to make a recording go back towards the beginn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lay along">
            <text:p>play along</text:p>
          </table:table-cell>
          <table:table-cell office:value-type="string" office:string-value="to act as if you agree with something that is happening, especially if it is  something wrong">
            <text:p>to act as if you agree with something that is happening, especially if it is  something wro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chlong">
            <text:p>schlong</text:p>
          </table:table-cell>
          <table:table-cell office:value-type="string" office:string-value="a rude word for penis">
            <text:p>a rude word for peni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ornet">
            <text:p>hornet</text:p>
          </table:table-cell>
          <table:table-cell office:value-type="string" office:string-value="a large wasp that can give you a bad sting">
            <text:p>a large wasp that can give you a bad st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asp">
            <text:p>wasp</text:p>
          </table:table-cell>
          <table:table-cell office:value-type="string" office:string-value="a flying insect, often black and yellow, that can sting">
            <text:p>a flying insect, often black and yellow, that can st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ting">
            <text:p>sting</text:p>
          </table:table-cell>
          <table:table-cell office:value-type="string" office:string-value="to produce a small but painful injury by making a very small hole in the skin, especially of insects and plants">
            <text:p>to produce a small but painful injury by making a very small hole in the skin, especially of insects and plant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ouble entendre">
            <text:p>double entendre</text:p>
          </table:table-cell>
          <table:table-cell office:value-type="string" office:string-value="a word or phrase that might be understood in two ways, one of which is usually sexual">
            <text:p>a word or phrase that might be understood in two ways, one of which is usually sexu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oot">
            <text:p>soot</text:p>
          </table:table-cell>
          <table:table-cell office:value-type="string" office:string-value="a black powder composed mainly of carbon, produced when coal, wood is burned">
            <text:p>a black powder composed mainly of carbon, produced when coal, wood is burn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marble">
            <text:p>marble</text:p>
          </table:table-cell>
          <table:table-cell office:value-type="string" office:string-value="a type of hard stone, often with a pattern of irregular lines going through it, that is used as a building material and in statues">
            <text:p>a type of hard stone, often with a pattern of irregular lines going through it, that is used as a building material and in statu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yond a reasonable doubt">
            <text:p>beyond a reasonable doubt</text:p>
          </table:table-cell>
          <table:table-cell office:value-type="string" office:string-value="there is enough proof for the person accused of a crime to be judged guilty">
            <text:p>there is enough proof for the person accused of a crime to be judged guilt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oller coaster">
            <text:p>roller coaster</text:p>
          </table:table-cell>
          <table:table-cell office:value-type="string" office:string-value="a small railroad, especially in an amusement park, with open cars that travel quickly along a steep, curved track that goes up and down over and over">
            <text:p>a small railroad, especially in an amusement park, with open cars that travel quickly along a steep, curved track that goes up and down over and ov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ather">
            <text:p>rather</text:p>
          </table:table-cell>
          <table:table-cell office:value-type="string" office:string-value="more exactly">
            <text:p>more exactl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sk someone out">
            <text:p>ask someone out</text:p>
          </table:table-cell>
          <table:table-cell office:value-type="string" office:string-value="to invite someone to come with you to a place such as the cinema or a restaurant, especially as a way of starting a romantic relationship">
            <text:p>to invite someone to come with you to a place such as the cinema or a restaurant, especially as a way of starting a romantic relationship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ckon">
            <text:p>beckon</text:p>
          </table:table-cell>
          <table:table-cell office:value-type="string" office:string-value="to attract people">
            <text:p>to attract peopl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izure">
            <text:p>seizure</text:p>
          </table:table-cell>
          <table:table-cell office:value-type="string" office:string-value="a very sudden attack of an illness in which someone becomes unconscious or develops violent movements">
            <text:p>a very sudden attack of an illness in which someone becomes unconscious or develops violent movement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coil">
            <text:p>recoil</text:p>
          </table:table-cell>
          <table:table-cell office:value-type="string" office:string-value="the sudden, backward movement that a gun makes when it is fired">
            <text:p>the sudden, backward movement that a gun makes when it is fir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ch">
            <text:p>itch</text:p>
          </table:table-cell>
          <table:table-cell office:value-type="string" office:string-value="to have or cause an uncomfortable feeling on the skin that makes you want to rub it with your nails">
            <text:p>to have or cause an uncomfortable feeling on the skin that makes you want to rub it with your nail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embarrassed">
            <text:p>embarrassed</text:p>
          </table:table-cell>
          <table:table-cell office:value-type="string" office:string-value="feeling ashamed or shy">
            <text:p>feeling ashamed or sh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unscathed">
            <text:p>unscathed</text:p>
          </table:table-cell>
          <table:table-cell office:value-type="string" office:string-value="without injuries or damage being caused">
            <text:p>without injuries or damage being caus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curfew">
            <text:p>curfew</text:p>
          </table:table-cell>
          <table:table-cell office:value-type="string" office:string-value="a rule that everyone must stay at home between particular times, usually at night, especially during a war or a period of political trouble">
            <text:p>a rule that everyone must stay at home between particular times, usually at night, especially during a war or a period of political troubl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iener">
            <text:p>wiener</text:p>
          </table:table-cell>
          <table:table-cell office:value-type="string" office:string-value="thin, red-brown sausage">
            <text:p>thin, red-brown sausag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humble">
            <text:p>humble</text:p>
          </table:table-cell>
          <table:table-cell office:value-type="string" office:string-value="ordinary, not special or very important">
            <text:p>ordinary, not special or very importan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pare">
            <text:p>spare</text:p>
          </table:table-cell>
          <table:table-cell office:value-type="string" office:string-value="to decide not to hurt or destroy something or someone">
            <text:p>to decide not to hurt or destroy something or someon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ally">
            <text:p>dally</text:p>
          </table:table-cell>
          <table:table-cell office:value-type="string" office:string-value="to waste time or do something slowly">
            <text:p>to waste time or do something slowl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utcast">
            <text:p>outcast</text:p>
          </table:table-cell>
          <table:table-cell office:value-type="string" office:string-value="a person who has no place in their society or in a particular group, because the society or group refuses to accept them">
            <text:p>a person who has no place in their society or in a particular group, because the society or group refuses to accept them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emise">
            <text:p>demise</text:p>
          </table:table-cell>
          <table:table-cell office:value-type="string" office:string-value="the end of the operation or existence of something / death">
            <text:p>the end of the operation or existence of something / death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 caught between a rock and a hard place">
            <text:p>be caught between a rock and a hard place</text:p>
          </table:table-cell>
          <table:table-cell office:value-type="string" office:string-value="to be in a very difficult situation">
            <text:p>to be in a very difficult situation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scend">
            <text:p>ascend</text:p>
          </table:table-cell>
          <table:table-cell office:value-type="string" office:string-value="to move up or climb something">
            <text:p>to move up or climb someth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landfill">
            <text:p>landfill</text:p>
          </table:table-cell>
          <table:table-cell office:value-type="string" office:string-value="a place where garbage is buried">
            <text:p>a place where garbage is buri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mithereens">
            <text:p>smithereens</text:p>
          </table:table-cell>
          <table:table-cell office:value-type="string" office:string-value="a lot of very small broken pieces">
            <text:p>a lot of very small broken pie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impani">
            <text:p>timpani</text:p>
          </table:table-cell>
          <table:table-cell office:value-type="string" office:string-value="a set of kettledrums played in an orchestra">
            <text:p>a set of kettledrums played in an orchestr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medy">
            <text:p>remedy</text:p>
          </table:table-cell>
          <table:table-cell office:value-type="string" office:string-value="a successful way of curing  an illness or dealing with a problem or difficulty">
            <text:p>a successful way of curing  an illness or dealing with a problem or difficult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af">
            <text:p>oaf</text:p>
          </table:table-cell>
          <table:table-cell office:value-type="string" office:string-value="a stupid, rude, or awkward person, especially a man">
            <text:p>a stupid, rude, or awkward person, especially a man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aste away">
            <text:p>waste away</text:p>
          </table:table-cell>
          <table:table-cell office:value-type="string" office:string-value="to gradually get thinner and weaker, especially from disease or lack of food">
            <text:p>to gradually get thinner and weaker, especially from disease or lack of foo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mug">
            <text:p>mug</text:p>
          </table:table-cell>
          <table:table-cell office:value-type="string" office:string-value="to attack a person in a public place and steal their money">
            <text:p>to attack a person in a public place and steal their mone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n broad daylight">
            <text:p>in broad daylight</text:p>
          </table:table-cell>
          <table:table-cell office:value-type="string" office:string-value="if crime is committed during the day, when it could have been seen and prevented">
            <text:p>if crime is committed during the day, when it could have been seen and prevent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khachapuri">
            <text:p>khachapuri</text:p>
          </table:table-cell>
          <table:table-cell office:value-type="string" office:string-value="Georgian dish of cheese-filled bread">
            <text:p>Georgian dish of cheese-filled brea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erd">
            <text:p>herd</text:p>
          </table:table-cell>
          <table:table-cell office:value-type="string" office:string-value="a large group of people">
            <text:p>a large group of peopl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tters">
            <text:p>betters</text:p>
          </table:table-cell>
          <table:table-cell office:value-type="string" office:string-value="people of a higher rank or social position than you">
            <text:p>people of a higher rank or social position than you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nn">
            <text:p>inn</text:p>
          </table:table-cell>
          <table:table-cell office:value-type="string" office:string-value="a pub where you can stay for the night, usually in the countryside">
            <text:p>a pub where you can stay for the night, usually in the countrysid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lotion">
            <text:p>lotion</text:p>
          </table:table-cell>
          <table:table-cell office:value-type="string" office:string-value="a liquid that you put on your skin in order to protect it, improve its condition, or make it smell pleasant">
            <text:p>a liquid that you put on your skin in order to protect it, improve its condition, or make it smell pleasan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crave">
            <text:p>crave</text:p>
          </table:table-cell>
          <table:table-cell office:value-type="string" office:string-value="to have a very strong feeling of wanting something">
            <text:p>to have a very strong feeling of wanting someth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age">
            <text:p>wage</text:p>
          </table:table-cell>
          <table:table-cell office:value-type="string" office:string-value="to begin and continue a war, a fight, or a plan to achieve something">
            <text:p>to begin and continue a war, a fight, or a plan to achieve someth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imp">
            <text:p>wimp</text:p>
          </table:table-cell>
          <table:table-cell office:value-type="string" office:string-value="a person who is not strong, brave, or confident">
            <text:p>a person who is not strong, brave, or confiden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ladder">
            <text:p>bladder</text:p>
          </table:table-cell>
          <table:table-cell office:value-type="string" office:string-value="an organ like a bag inside the body of a person or animal, where urine is stored before it leaves the body">
            <text:p>an organ like a bag inside the body of a person or animal, where urine is stored before it leaves the bod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jewel">
            <text:p>jewel</text:p>
          </table:table-cell>
          <table:table-cell office:value-type="string" office:string-value="a precious stone that is used to decorate valuable objects">
            <text:p>a precious stone that is used to decorate valuable object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gem">
            <text:p>gem</text:p>
          </table:table-cell>
          <table:table-cell office:value-type="string" office:string-value="a jewel, especially when cut into a particular regular shape">
            <text:p>a jewel, especially when cut into a particular regular shap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ump">
            <text:p>dump</text:p>
          </table:table-cell>
          <table:table-cell office:value-type="string" office:string-value="to suddenly end a romantic relationship you have been having with someone">
            <text:p>to suddenly end a romantic relationship you have been having with someone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